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xiforma-Regular" svg:font-family="Axiforma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ad203" officeooo:paragraph-rsid="000ad203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fr" fo:country="F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Standard">
      <style:text-properties officeooo:rsid="00075ed1" officeooo:paragraph-rsid="00075ed1"/>
    </style:style>
    <style:style style:name="P5" style:family="paragraph" style:parent-style-name="Standard">
      <style:text-properties officeooo:rsid="00088e7d" officeooo:paragraph-rsid="00088e7d"/>
    </style:style>
    <style:style style:name="P6" style:family="paragraph" style:parent-style-name="Standard">
      <style:text-properties fo:color="#c9211e" officeooo:rsid="00075ed1" officeooo:paragraph-rsid="00075ed1"/>
    </style:style>
    <style:style style:name="P7" style:family="paragraph" style:parent-style-name="Standard">
      <style:paragraph-properties fo:text-align="center" style:justify-single-word="false"/>
      <style:text-properties fo:color="#c9211e" fo:font-size="14pt" fo:font-weight="bold" officeooo:rsid="00088e7d" officeooo:paragraph-rsid="00088e7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c9211e" officeooo:rsid="0016b621" officeooo:paragraph-rsid="0016b621"/>
    </style:style>
    <style:style style:name="P9" style:family="paragraph" style:parent-style-name="Standard">
      <style:text-properties fo:color="#c9211e" officeooo:rsid="001fd9a3" officeooo:paragraph-rsid="001fd9a3"/>
    </style:style>
    <style:style style:name="P10" style:family="paragraph" style:parent-style-name="Standard">
      <style:text-properties officeooo:rsid="000ad203" officeooo:paragraph-rsid="000ad203"/>
    </style:style>
    <style:style style:name="P11" style:family="paragraph" style:parent-style-name="Standard">
      <style:text-properties officeooo:rsid="000bd81a" officeooo:paragraph-rsid="000bd81a"/>
    </style:style>
    <style:style style:name="P12" style:family="paragraph" style:parent-style-name="Standard">
      <style:text-properties officeooo:rsid="000cba5f" officeooo:paragraph-rsid="000cba5f"/>
    </style:style>
    <style:style style:name="P13" style:family="paragraph" style:parent-style-name="Standard">
      <style:text-properties officeooo:rsid="000cba5f" officeooo:paragraph-rsid="000d7faa"/>
    </style:style>
    <style:style style:name="P14" style:family="paragraph" style:parent-style-name="Standard">
      <style:text-properties officeooo:rsid="000f7828" officeooo:paragraph-rsid="000f7828"/>
    </style:style>
    <style:style style:name="P15" style:family="paragraph" style:parent-style-name="Standard">
      <style:text-properties officeooo:rsid="000f7828" officeooo:paragraph-rsid="0010016b"/>
    </style:style>
    <style:style style:name="P16" style:family="paragraph" style:parent-style-name="Standard">
      <style:text-properties officeooo:rsid="0010016b" officeooo:paragraph-rsid="0010016b"/>
    </style:style>
    <style:style style:name="P17" style:family="paragraph" style:parent-style-name="Standard">
      <style:text-properties fo:color="#000000" officeooo:rsid="0016b621" officeooo:paragraph-rsid="0016b621"/>
    </style:style>
    <style:style style:name="P18" style:family="paragraph" style:parent-style-name="Standard">
      <style:text-properties fo:color="#000000" officeooo:rsid="0017e138" officeooo:paragraph-rsid="0017e138"/>
    </style:style>
    <style:style style:name="P19" style:family="paragraph" style:parent-style-name="Standard">
      <style:text-properties fo:color="#000000" officeooo:rsid="00182601" officeooo:paragraph-rsid="00182601"/>
    </style:style>
    <style:style style:name="P20" style:family="paragraph" style:parent-style-name="Standard">
      <style:text-properties fo:color="#000000" officeooo:rsid="00188ed8" officeooo:paragraph-rsid="00188ed8"/>
    </style:style>
    <style:style style:name="P21" style:family="paragraph" style:parent-style-name="Standard">
      <style:text-properties fo:color="#000000" officeooo:rsid="001915d6" officeooo:paragraph-rsid="001915d6"/>
    </style:style>
    <style:style style:name="P22" style:family="paragraph" style:parent-style-name="Standard">
      <style:text-properties fo:color="#000000" officeooo:rsid="001bf47b" officeooo:paragraph-rsid="001bf47b"/>
    </style:style>
    <style:style style:name="P23" style:family="paragraph" style:parent-style-name="Standard">
      <style:text-properties fo:color="#000000" officeooo:rsid="001db804" officeooo:paragraph-rsid="001db804"/>
    </style:style>
    <style:style style:name="P24" style:family="paragraph" style:parent-style-name="Standard">
      <style:text-properties fo:color="#000000" officeooo:rsid="001ea30d" officeooo:paragraph-rsid="001ea30d"/>
    </style:style>
    <style:style style:name="P25" style:family="paragraph" style:parent-style-name="Standard">
      <style:text-properties fo:color="#000000" officeooo:rsid="001fd9a3" officeooo:paragraph-rsid="001fd9a3"/>
    </style:style>
    <style:style style:name="P26" style:family="paragraph" style:parent-style-name="Standard">
      <style:text-properties fo:color="#000000" officeooo:rsid="00219e6d" officeooo:paragraph-rsid="00219e6d"/>
    </style:style>
    <style:style style:name="P27" style:family="paragraph" style:parent-style-name="Standard">
      <style:text-properties fo:color="#000000" officeooo:rsid="00222746" officeooo:paragraph-rsid="00222746"/>
    </style:style>
    <style:style style:name="P28" style:family="paragraph" style:parent-style-name="Standard">
      <style:text-properties fo:color="#000000" officeooo:rsid="00231870" officeooo:paragraph-rsid="00222746"/>
    </style:style>
    <style:style style:name="P29" style:family="paragraph" style:parent-style-name="Standard">
      <style:text-properties fo:color="#000000" officeooo:rsid="00231870" officeooo:paragraph-rsid="00231870"/>
    </style:style>
    <style:style style:name="P30" style:family="paragraph" style:parent-style-name="Standard">
      <style:text-properties fo:color="#000000" officeooo:rsid="0023a3ce" officeooo:paragraph-rsid="0023a3ce"/>
    </style:style>
    <style:style style:name="P31" style:family="paragraph" style:parent-style-name="Standard">
      <style:text-properties fo:color="#000000" officeooo:rsid="002584ef" officeooo:paragraph-rsid="002584ef"/>
    </style:style>
    <style:style style:name="P32" style:family="paragraph" style:parent-style-name="Standard">
      <style:text-properties fo:color="#000000" officeooo:rsid="0025b6dc" officeooo:paragraph-rsid="0025b6dc"/>
    </style:style>
    <style:style style:name="P33" style:family="paragraph" style:parent-style-name="Standard">
      <style:text-properties officeooo:paragraph-rsid="00231870"/>
    </style:style>
    <style:style style:name="P34" style:family="paragraph" style:parent-style-name="Standard">
      <style:text-properties officeooo:paragraph-rsid="0023a3ce"/>
    </style:style>
    <style:style style:name="P35" style:family="paragraph" style:parent-style-name="Standard">
      <style:text-properties fo:color="#2a6099" officeooo:rsid="0025b6dc" officeooo:paragraph-rsid="0025b6dc"/>
    </style:style>
    <style:style style:name="T1" style:family="text">
      <style:text-properties officeooo:rsid="000cba5f"/>
    </style:style>
    <style:style style:name="T2" style:family="text">
      <style:text-properties officeooo:rsid="000d7faa"/>
    </style:style>
    <style:style style:name="T3" style:family="text">
      <style:text-properties officeooo:rsid="0010016b"/>
    </style:style>
    <style:style style:name="T4" style:family="text">
      <style:text-properties fo:language="fr" fo:country="FR"/>
    </style:style>
    <style:style style:name="T5" style:family="text">
      <style:text-properties officeooo:rsid="00188ed8"/>
    </style:style>
    <style:style style:name="T6" style:family="text">
      <style:text-properties fo:color="#000000" officeooo:rsid="00231870"/>
    </style:style>
    <style:style style:name="T7" style:family="text">
      <style:text-properties fo:color="#000000" officeooo:rsid="0023a3ce"/>
    </style:style>
    <style:style style:name="T8" style:family="text">
      <style:text-properties officeooo:rsid="00219e6d"/>
    </style:style>
    <style:style style:name="T9" style:family="text">
      <style:text-properties fo:font-variant="normal" fo:text-transform="none" fo:color="#000000" style:font-name="Axiforma-Regular" fo:font-size="9.60000038146973pt" fo:letter-spacing="normal" fo:font-style="normal" fo:font-weight="normal" officeooo:rsid="00231870"/>
    </style:style>
    <style:style style:name="T10" style:family="text">
      <style:text-properties officeooo:rsid="0023a3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Premier cours B2</text:p>
      <text:p text:style-name="P6">Lundi 03/10/22:</text:p>
      <text:p text:style-name="P6"/>
      <text:p text:style-name="P4">git: <text:s/>centraliser </text:p>
      <text:p text:style-name="P5">projet web c’est pas un projet informatique dont les livrables ont pour destination le web ( le réseau internet)</text:p>
      <text:p text:style-name="P5">les objectifs d’un projet web: visibilité sur le site web, les réseau sociaux, analyse</text:p>
      <text:p text:style-name="P5"/>
      <text:p text:style-name="P1">la gestion de projet il y a un cahier des charges qui retrouve des documents réels pour partager les tickets en échange   </text:p>
      <text:p text:style-name="P2">je suis technicien qualité je suis responsable qualité pour moi c'était pas des métiers  </text:p>
      <text:p text:style-name="P2">il faut des livrables des produits  </text:p>
      <text:p text:style-name="P2">la visibilité web ça passe par une plateforme aujourd'hui à 97% ou 95% des parts de marché   </text:p>
      <text:p text:style-name="P2">la prochaine mise à jour chrome=&gt; considéré comme logiciel malveillant  </text:p>
      <text:p text:style-name="P2">ça va fortement ralentir vos navigateurs  </text:p>
      <text:p text:style-name="P3"> <text:span text:style-name="T4">les outils utilisés ils évoluent avec les standards du web si vous avez une technique de gestion de projet :Google vos idées vos logiciels vos licences tout ça on vous prévient qu'une mise à jour  </text:span></text:p>
      <text:p text:style-name="P2">ROI c'est un rapport  </text:p>
      <text:p text:style-name="P2">qu'il a gagné de l'argent pour que ça tourne et rentable =&gt; tu gagnes de l'argent libre à toi </text:p>
      <text:p text:style-name="P3"> <text:span text:style-name="T4">une application développée en interne son but c'est de gagner du temps sur des tâches répétitives de faire des exports  </text:span></text:p>
      <text:p text:style-name="P2">un projet web de la gestion de vol de formaliser tous les moyens et tous les outils et moyens humains financiers tout ce qu'on veut tout centraliser à un endroit le but c'est de faire quelque chose ça tourne donc au final il y a un produit délivrables  </text:p>
      <text:p text:style-name="P3"> </text:p>
      <text:p text:style-name="P2">Termes utiles gestion du projet: </text:p>
      <text:p text:style-name="P2">La déf d'un projet  </text:p>
      <text:p text:style-name="P2">Les enjeux d'un projet web </text:p>
      <text:p text:style-name="P2">les moyens d'un projet web: financier le temps , Software et hardware OK J'ai compris ça ouais ça peut être plein de choses  </text:p>
      <text:p text:style-name="P3"> </text:p>
      <text:p text:style-name="P2">quand je parle de logiciel je parle de licence on n'a pas le droit de vendre n'importe quoi </text:p>
      <text:p text:style-name="P2">moyen technique licence logiciel serveur c'est à peu près tout ce que en général on fait le tour moyens financiers on appelle ça l'avant-projet la bande projet c'est tout ce qui est en licence matériel info à prévoir en amont pour le développement et pour les premiers hébergements,  mais c'est tout ce qui vient après le développement de ce projet c'est maintenant c'est évolution  </text:p>
      <text:p text:style-name="P2">et les licences pareil faut les renouveler  </text:p>
      <text:p text:style-name="P3"> </text:p>
      <text:p text:style-name="P2">Une application mobile le but de l'appli c'est d'utiliser son téléphone  </text:p>
      <text:p text:style-name="P2">combien de systèmes d'exploitation 2 </text:p>
      <text:p text:style-name="P3"> <text:span text:style-name="T4">elle doit être passer compatible la première contrainte on fait un projet web c'est la compatible alors moi je développé mon site web javascript n'évolue super nouvelle mise à jour et alors exemple je vais sur la documentation officielle javascript j'ai déployé en j'ai fait une appli web j'ai testé retesté tout fonctionne </text:span></text:p>
      <text:p text:style-name="P2"><text:soft-page-break/>le organismes en France CNIL on parle d'argent c'est la réglementation de manière générale sur la protection des données personnelles mais pas que personnelles les données du genre il y a d'autres choses aussi qui entrent dans le cadre légal et réglementaires protection des personnes français de la protection des données  </text:p>
      <text:p text:style-name="P3"> <text:span text:style-name="T4">c'est l'organisme qui garantit la protection des données </text:span></text:p>
      <text:p text:style-name="P3"> </text:p>
      <text:p text:style-name="P2">l'arbitrage du projet pour garantir la qualité c'est impliqué la phase de test, il arrive souvent maintenant les clients participent à la recette pour leur fournit un environnement similaire à la prod référence où qui sur un serveur local dans nos clients d'aller bien tester le produit avant la mise en ligne permettre : </text:p>
      <text:p text:style-name="P2">de maîtriser ces notions surtout les mettre en application sur des outils concrets mettre un petit projet en place  </text:p>
      <text:p text:style-name="P10"/>
      <text:p text:style-name="P11">l’arbitrage d’un projet web/ comite de comite de pilotage</text:p>
      <text:p text:style-name="P11">contrôle;</text:p>
      <text:p text:style-name="P11">-cout</text:p>
      <text:p text:style-name="P11">-qualité</text:p>
      <text:p text:style-name="P11">-delai</text:p>
      <text:p text:style-name="P11"/>
      <text:p text:style-name="P11"><text:span text:style-name="T1">les étapes d’un projet web</text:span> </text:p>
      <text:p text:style-name="P11"/>
      <text:p text:style-name="P12">les différents projets web:</text:p>
      <text:p text:style-name="P12">-le site statique: les pages web sont envoyées au client telles qu’elle stockes sur le serveur web ( HTML/ <text:s/>js ). produit le plus simple </text:p>
      <text:p text:style-name="P13">-les sites dynamique: bcp des media =&gt; les sites dont le JS <text:s/>est prépondérante, les applications web</text:p>
      <text:p text:style-name="P13"/>
      <text:p text:style-name="P13">-<text:span text:style-name="T2">les extranets</text:span></text:p>
      <text:p text:style-name="P13">-<text:span text:style-name="T2">les portails d’entreprise </text:span></text:p>
      <text:p text:style-name="P13">-<text:span text:style-name="T2">les intranets </text:span></text:p>
      <text:p text:style-name="P13">-<text:span text:style-name="T2">les projets web et mobile</text:span></text:p>
      <text:p text:style-name="P13"/>
      <text:p text:style-name="P14">les acteurs d’un projet</text:p>
      <text:p text:style-name="P14"/>
      <text:p text:style-name="P15">MOA la maîtrise d’ouvrage <text:s/>=&gt; <text:s/>réaliser les teste =&gt; pas besoin d’un compétence technique <text:span text:style-name="T3">=&gt; la stratégie de gestion du projet</text:span></text:p>
      <text:p text:style-name="P15"/>
      <text:p text:style-name="P15"><text:span text:style-name="T3">comite du pilotage: <text:s text:c="2"/></text:span><text:s/></text:p>
      <text:p text:style-name="P15"/>
      <text:p text:style-name="P16">comite de suivi: </text:p>
      <text:p text:style-name="P16"/>
      <text:p text:style-name="P16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Mardi 4/10/22:</text:p>
      <text:p text:style-name="P8"/>
      <text:p text:style-name="P17">Projet:</text:p>
      <text:p text:style-name="P22">technique gestion du projet</text:p>
      <text:p text:style-name="P17">définir la date de début et la fin pour un projet</text:p>
      <text:p text:style-name="P18">la métodagille produit testable par le client, </text:p>
      <text:p text:style-name="P18">régression: quand le client jette le projet et de commencer de nouveaux </text:p>
      <text:p text:style-name="P18"/>
      <text:p text:style-name="P19">3 type de ressources:</text:p>
      <text:p text:style-name="P19">-type travail =&gt; ressources humaine </text:p>
      <text:p text:style-name="P19">-consommable =&gt; serveur</text:p>
      <text:p text:style-name="P19">- <text:span text:style-name="T5">frais des déplacement/</text:span>les dépenses =&gt; coût</text:p>
      <text:p text:style-name="P20"/>
      <text:p text:style-name="P20"/>
      <text:p text:style-name="P20">macro planning =&gt; <text:s/>vue globale temporaire du projet </text:p>
      <text:p text:style-name="P19"/>
      <text:p text:style-name="P21">les ressources sont rénumérer <text:s/></text:p>
      <text:p text:style-name="P21"/>
      <text:p text:style-name="P23">SSH : protection du serveur </text:p>
      <text:p text:style-name="P23"/>
      <text:p text:style-name="P24">java EE : assurance / banquez </text:p>
      <text:p text:style-name="P24">spring :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A savoir:</text:p>
      <text:p text:style-name="P34"><text:span text:style-name="T7">-</text:span><text:a xlink:type="simple" xlink:href="https://sara-awad.youtrack.cloud/agiles/131-0/current" text:style-name="Internet_20_link" text:visited-style-name="Visited_20_Internet_20_Link">Premier sprint – Projet de démo Tableau – Tableau Agile YouTrack</text:a> </text:p>
      <text:p text:style-name="P34"><text:span text:style-name="T7">-lamp stack: </text:span><text:a xlink:type="simple" xlink:href="https://fr.wikipedia.org/wiki/LAMP" text:style-name="Internet_20_link" text:visited-style-name="Visited_20_Internet_20_Link">LAMP — Wikipédia (wikipedia.org)</text:a> </text:p>
      <text:p text:style-name="P34">-mern stack</text:p>
      <text:p text:style-name="P30"/>
      <text:p text:style-name="P18"/>
      <text:p text:style-name="P35">cleancode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><text:soft-page-break/>Mercredi 5/10:</text:p>
      <text:p text:style-name="P9"/>
      <text:p text:style-name="P25">les méthodologies de gestion du projet </text:p>
      <text:p text:style-name="P25">planifier tous les taches </text:p>
      <text:p text:style-name="P25">le chef de projet va utiliser la méthode la plus adapte a son projet et surtout la plus adapte </text:p>
      <text:p text:style-name="P25"/>
      <text:p text:style-name="P25">la méthode la plus utiliser </text:p>
      <text:p text:style-name="P25">le modèle: cycle en cascade =&gt; étape par étape pour avoir une objectif finale </text:p>
      <text:p text:style-name="P25">les étapes du projet s’enchainent les unes après les autres </text:p>
      <text:p text:style-name="P27">si ca marche pas on refait tous les étape </text:p>
      <text:p text:style-name="P25"/>
      <text:p text:style-name="P25">Analyse (du besoin client)</text:p>
      <text:p text:style-name="P25">conception <text:span text:style-name="T8">=&gt; définir le produit , création du produit</text:span></text:p>
      <text:p text:style-name="P25">planification <text:span text:style-name="T8">=&gt; choisir les BDD ou un serveur </text:span></text:p>
      <text:p text:style-name="P25">Réalisation</text:p>
      <text:p text:style-name="P25">versification (test , recette)</text:p>
      <text:p text:style-name="P25">Mise en production </text:p>
      <text:p text:style-name="P25">Maintenance </text:p>
      <text:p text:style-name="P25"/>
      <text:p text:style-name="P26">les avantages: pour un projet simple </text:p>
      <text:p text:style-name="P26"/>
      <text:p text:style-name="P27">le modèle cycle en V:</text:p>
      <text:p text:style-name="P27">cette méthode dérive de la precedente et son but est de pallier au manque de flexibilité de la méthode en cascade </text:p>
      <text:p text:style-name="P27"/>
      <text:p text:style-name="P27">prévoir un test pour chaque étape =&gt; s’assurer que ca va fonctionné =&gt; pas de retour </text:p>
      <text:p text:style-name="P27"/>
      <text:p text:style-name="P33"><text:span text:style-name="T6">architecture micro service: </text:span><text:span text:style-name="T9">un style particulier de conception des applications logicielles. Contrairement aux styles architecturaux traditionnels qui visent à construire un logiciel comme une seule et unique unité,</text:span><text:span text:style-name="T6"> </text:span></text:p>
      <text:p text:style-name="P28"/>
      <text:p text:style-name="P29">le modèle Agile: </text:p>
      <text:p text:style-name="P29">le client est implique tout au long de la conception du produit finale, le besoin initial peut changer pour s’adapter a tous les changement et difficultés rencontres </text:p>
      <text:p text:style-name="P29"/>
      <text:p text:style-name="P29"><text:span text:style-name="T10">A</text:span>u sein des méthodes traditionnels on concoit un livrable final des le départ</text:p>
      <text:p text:style-name="P29">Pour les méthodes agiles, on se fixe des objectifs successifs et a chaque objectif atteint on se fixe avec l’aide du client un nouvel objectif</text:p>
      <text:p text:style-name="P29"/>
      <text:p text:style-name="P29"/>
      <text:p text:style-name="P29"/>
      <text:p text:style-name="P29"/>
      <text:p text:style-name="P35"/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xiforma-Regular" svg:font-family="Axiforma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09:22:00.975000000</meta:creation-date>
    <dc:date>2022-10-05T10:21:46.718000000</dc:date>
    <meta:editing-duration>PT16H38M57S</meta:editing-duration>
    <meta:editing-cycles>3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96" meta:word-count="1018" meta:character-count="6108" meta:non-whitespace-character-count="5080"/>
  </office:meta>
</office:document-meta>
</file>